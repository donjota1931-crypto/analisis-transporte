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B000001A3A7237EF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5.805cm" draw:z-index="0"><draw:image xlink:href="Pictures/10000001000004CB000001A3A7237E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24T10:00:32.692000000</meta:creation-date>
    <dc:date>2026-06-24T10:01:52.833000000</dc:date>
    <meta:editing-duration>PT1M2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8.0.3$Windows_X86_64 LibreOffice_project/0bdf1299c94fe897b119f97f3c613e9dca6be583</meta:generator>
  </office:meta>
</office:document-meta>
</file>